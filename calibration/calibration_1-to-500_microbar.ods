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essure(mubar)</text:p>
          </table:table-cell>
          <table:table-cell office:value-type="string" calcext:value-type="string">
            <text:p>Voltage(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218" calcext:value-type="float">
            <text:p>4.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.254" calcext:value-type="float">
            <text:p>4.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.262" calcext:value-type="float">
            <text:p>4.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328" calcext:value-type="float">
            <text:p>4.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.337" calcext:value-type="float">
            <text:p>4.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.347" calcext:value-type="float">
            <text:p>4.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.357" calcext:value-type="float">
            <text:p>4.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.395" calcext:value-type="float">
            <text:p>4.3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.928" calcext:value-type="float">
            <text:p>3.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.948" calcext:value-type="float">
            <text:p>3.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.963" calcext:value-type="float">
            <text:p>3.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.983" calcext:value-type="float">
            <text:p>3.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.022" calcext:value-type="float">
            <text:p>4.0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5.039" calcext:value-type="float">
            <text:p>5.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.712" calcext:value-type="float">
            <text:p>4.7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5.395" calcext:value-type="float">
            <text:p>5.3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0" calcext:value-type="float">
            <text:p>230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5.804" calcext:value-type="float">
            <text:p>5.8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0" calcext:value-type="float">
            <text:p>470</text:p>
          </table:table-cell>
          <table:table-cell office:value-type="float" office:value="6.26" calcext:value-type="float">
            <text:p>6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2:24:30.200684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7:16:20.587316471</meta:creation-date>
    <dc:date>2026-06-18T12:31:12.736933987</dc:date>
    <meta:editing-duration>PT17H12M15S</meta:editing-duration>
    <meta:editing-cycles>33</meta:editing-cycles>
    <meta:generator>LibreOffice/26.2.3.2$Linux_X86_64 LibreOffice_project/620$Build-2</meta:generator>
    <meta:document-statistic meta:table-count="1" meta:cell-count="117" meta:object-count="0"/>
  </office:meta>
</office:document-meta>
</file>