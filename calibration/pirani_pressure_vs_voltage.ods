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218" calcext:value-type="float">
            <text:p>4.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.254" calcext:value-type="float">
            <text:p>4.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.262" calcext:value-type="float">
            <text:p>4.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328" calcext:value-type="float">
            <text:p>4.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.337" calcext:value-type="float">
            <text:p>4.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.347" calcext:value-type="float">
            <text:p>4.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.357" calcext:value-type="float">
            <text:p>4.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4.395" calcext:value-type="float">
            <text:p>4.3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.411" calcext:value-type="float">
            <text:p>4.4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4.421" calcext:value-type="float">
            <text:p>4.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.928" calcext:value-type="float">
            <text:p>3.9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.948" calcext:value-type="float">
            <text:p>3.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.963" calcext:value-type="float">
            <text:p>3.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.983" calcext:value-type="float">
            <text:p>3.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.022" calcext:value-type="float">
            <text:p>4.0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00" calcext:value-type="float">
            <text:p>1900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00" calcext:value-type="float">
            <text:p>6200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00" calcext:value-type="float">
            <text:p>900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00" calcext:value-type="float">
            <text:p>16000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00" calcext:value-type="float">
            <text:p>80000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000" calcext:value-type="float">
            <text:p>190000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0000" calcext:value-type="float">
            <text:p>900000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9000" calcext:value-type="float">
            <text:p>999000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5.039" calcext:value-type="float">
            <text:p>5.0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0" calcext:value-type="float">
            <text:p>89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00" calcext:value-type="float">
            <text:p>2100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00" calcext:value-type="float">
            <text:p>3500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00" calcext:value-type="float">
            <text:p>640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00" calcext:value-type="float">
            <text:p>9800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00" calcext:value-type="float">
            <text:p>12000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00" calcext:value-type="float">
            <text:p>2000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000" calcext:value-type="float">
            <text:p>37000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0" calcext:value-type="float">
            <text:p>65000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000" calcext:value-type="float">
            <text:p>11000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000" calcext:value-type="float">
            <text:p>160000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0000" calcext:value-type="float">
            <text:p>700000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3250" calcext:value-type="float">
            <text:p>1013250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.712" calcext:value-type="float">
            <text:p>4.7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5.395" calcext:value-type="float">
            <text:p>5.3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0" calcext:value-type="float">
            <text:p>230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5.804" calcext:value-type="float">
            <text:p>5.8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0" calcext:value-type="float">
            <text:p>470</text:p>
          </table:table-cell>
          <table:table-cell office:value-type="float" office:value="6.26" calcext:value-type="float">
            <text:p>6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12:25:19.7378913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10:39:18.633806941</meta:creation-date>
    <dc:date>2026-06-18T12:31:00.718582008</dc:date>
    <meta:editing-duration>PT42M26S</meta:editing-duration>
    <meta:editing-cycles>7</meta:editing-cycles>
    <meta:generator>LibreOffice/26.2.3.2$Linux_X86_64 LibreOffice_project/620$Build-2</meta:generator>
    <meta:document-statistic meta:table-count="1" meta:cell-count="183" meta:object-count="0"/>
  </office:meta>
</office:document-meta>
</file>